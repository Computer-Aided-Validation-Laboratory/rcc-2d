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nderer Convergence Analysi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Frame/Def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Integration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 office:value-type="string" calcext:value-type="string">
            <text:p>Analyti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 office:value-type="string" calcext:value-type="string">
            <text:p>Analyti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07:42:37.309877194</meta:creation-date>
    <dc:date>2026-07-19T07:55:36.770300973</dc:date>
    <meta:editing-duration>PT2M36S</meta:editing-duration>
    <meta:editing-cycles>1</meta:editing-cycles>
    <meta:document-statistic meta:table-count="1" meta:cell-count="32" meta:object-count="0"/>
    <meta:generator>LibreOffice/26.2.4.2$Linux_X86_64 LibreOffice_project/3346a99e6b841765b75a9b29714a5b95c6761ce3</meta:generator>
  </office:meta>
</office:document-meta>
</file>